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46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4.5cm" fo:min-width="22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0cm" fo:min-width="21.7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9.25cm" fo:min-width="21.7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4cm" fo:min-width="21.7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756cm" fo:min-width="2.8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cm" fo:min-width="12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co1" style:family="table-column">
      <style:table-column-properties style:column-width="18.663cm" style:use-optimal-column-width="false"/>
    </style:style>
    <style:style style:name="co2" style:family="table-column">
      <style:table-column-properties style:column-width="37.611cm" style:use-optimal-column-width="false"/>
    </style:style>
    <style:style style:name="co3" style:family="table-column">
      <style:table-column-properties style:column-width="37.041cm" style:use-optimal-column-width="false"/>
    </style:style>
    <style:style style:name="ro1" style:family="table-row">
      <style:table-row-properties style:row-height="3.707cm" style:use-optimal-row-height="false"/>
    </style:style>
    <style:style style:name="ro2" style:family="table-row">
      <style:table-row-properties style:row-height="3.723cm" style:use-optimal-row-height="false"/>
    </style:style>
    <style:style style:name="ce1" style:family="table-cell">
      <style:text-properties fo:font-size="72pt" style:font-size-asian="72pt" style:font-size-complex="72pt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7cm" svg:height="5cm" svg:x="26.5cm" svg:y="2cm">
          <text:p text:style-name="P1">WECOME MESS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cm" svg:height="34.75cm" svg:x="4.75cm" svg:y="10.25cm">
          <text:p text:style-name="P1">Frequently Visited Sit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2.25cm" svg:height="10.25cm" svg:x="74cm" svg:y="10.5cm">
          <text:p text:style-name="P1">To Do Lis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2.25cm" svg:height="9.5cm" svg:x="74cm" svg:y="22.75cm">
          <text:p text:style-name="P1">Important Reminde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2.25cm" svg:height="9.5cm" svg:x="74cm" svg:y="34.75cm">
          <text:p text:style-name="P1">Light Reminde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2.25cm" svg:height="34.25cm" svg:x="39.5cm" svg:y="10.25cm">
          <text:p text:style-name="P1">Bookmark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75cm" svg:height="4.25cm" svg:x="5.5cm" svg:y="2.25cm">
          <text:p text:style-name="P1">Profile Picture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7" draw:text-style-name="P1" draw:layer="layout" svg:width="12.5cm" svg:height="5.25cm" svg:x="83cm" svg:y="1.75cm">
          <text:p text:style-name="P1"><text:span text:style-name="T1">TIME</text:span><text:span text:style-name="T1"><text:line-break/></text:span><text:span text:style-name="T1">Weath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8" draw:layer="layout" svg:width="93.314cm" svg:height="49.105cm" svg:x="3cm" svg:y="3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Feature Name</text:p>
              </table:table-cell>
              <table:table-cell>
                <text:p text:style-name="P2">Comment</text:p>
              </table:table-cell>
              <table:table-cell>
                <text:p text:style-name="P2">Progress</text:p>
              </table:table-cell>
            </table:table-row>
            <table:table-row table:style-name="ro1" table:default-cell-style-name="ce1">
              <table:table-cell>
                <text:p text:style-name="P2">Settings Tab</text:p>
              </table:table-cell>
              <table:table-cell>
                <text:p text:style-name="P2"><text:span text:style-name="T2">1. Change Theme</text:span></text:p>
                <text:p text:style-name="P2"><text:span text:style-name="T2">2. Adjust elements by drag and drop</text:span></text:p>
                <text:p text:style-name="P2"><text:span text:style-name="T2">3. Change backgroud wallpaper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Dynamic Clock</text:p>
              </table:table-cell>
              <table:table-cell>
                <text:p text:style-name="P2"><text:span text:style-name="T2">1. Showing seconds aswell</text:span></text:p>
                <text:p text:style-name="P2"><text:span text:style-name="T2">2. Weather below it with suitable icon</text:span></text:p>
                <text:p text:style-name="P2"><text:span text:style-name="T2">3. 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Dynamic Weather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100cm" fo:page-height="5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4T18:51:55.815213150</meta:creation-date>
    <dc:date>2026-05-14T19:37:50.498303440</dc:date>
    <meta:editing-duration>PT24M39S</meta:editing-duration>
    <meta:editing-cycles>3</meta:editing-cycles>
    <meta:generator>LibreOffice/26.2.3.2$Linux_X86_64 LibreOffice_project/a31940f583db492bb69b3a601caf6d1b0ecf61f1</meta:generator>
    <meta:document-statistic meta:object-count="9"/>
  </office:meta>
</office:document-meta>
</file>