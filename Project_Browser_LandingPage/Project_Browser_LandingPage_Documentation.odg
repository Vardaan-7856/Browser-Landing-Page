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46.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6cm" fo:min-width="22.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5cm" fo:min-width="21.7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6cm" fo:min-width="2.86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cm" fo:min-width="1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0cm" fo:min-width="21.7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4.5cm" fo:min-width="18.7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4.25cm" fo:min-width="16.5cm" style:writing-mode="lr-tb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co1" style:family="table-column">
      <style:table-column-properties style:column-width="18.663cm" style:use-optimal-column-width="false"/>
    </style:style>
    <style:style style:name="co2" style:family="table-column">
      <style:table-column-properties style:column-width="37.611cm" style:use-optimal-column-width="false"/>
    </style:style>
    <style:style style:name="co3" style:family="table-column">
      <style:table-column-properties style:column-width="37.041cm" style:use-optimal-column-width="false"/>
    </style:style>
    <style:style style:name="ro1" style:family="table-row">
      <style:table-row-properties style:row-height="3.707cm" style:use-optimal-row-height="false"/>
    </style:style>
    <style:style style:name="ro2" style:family="table-row">
      <style:table-row-properties style:row-height="3.723cm" style:use-optimal-row-height="false"/>
    </style:style>
    <style:style style:name="ce1" style:family="table-cell">
      <style:text-properties fo:font-size="72pt" style:font-size-asian="72pt" style:font-size-complex="72pt"/>
    </style:style>
    <style:style style:name="P1" style:family="paragraph">
      <style:paragraph-properties fo:text-align="center"/>
      <style:text-properties fo:font-size="54pt" style:font-size-asian="54pt" style:font-size-complex="54pt"/>
    </style:style>
    <style:style style:name="P2" style:family="paragraph">
      <style:paragraph-properties fo:text-align="center" style:writing-mode="lr-tb"/>
      <style:text-properties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72pt" style:font-size-asian="72pt" style:font-size-complex="72pt"/>
    </style:style>
    <style:style style:name="P6" style:family="paragraph">
      <style:text-properties style:font-size-asian="72pt" style:font-size-complex="7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66pt" style:font-size-asian="292.700012207031pt" style:font-size-complex="292.700012207031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7cm" svg:height="5cm" svg:x="26.5cm" svg:y="2cm">
          <text:p text:style-name="P1"><text:span text:style-name="T1">WECOME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cm" svg:height="26.25cm" svg:x="4.75cm" svg:y="18.75cm">
          <text:p text:style-name="P1"><text:span text:style-name="T1">Frequently Visited Sit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25cm" svg:height="25.25cm" svg:x="33cm" svg:y="19.5cm">
          <text:p text:style-name="P1"><text:span text:style-name="T1">Bookmark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5cm" svg:height="4.25cm" svg:x="5.5cm" svg:y="2.25cm">
          <text:p text:style-name="P1"><text:span text:style-name="T2">PP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2.5cm" svg:height="5.25cm" svg:x="83cm" svg:y="1.75cm">
          <text:p text:style-name="P1"><text:span text:style-name="T3">TIME</text:span><text:span text:style-name="T3"><text:line-break/></text:span><text:span text:style-name="T3">Weath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2.25cm" svg:height="10.25cm" svg:x="39.5cm" svg:y="8.25cm">
          <text:p text:style-name="P1"><text:span text:style-name="T4">Enter your cont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9.25cm" svg:height="24.75cm" svg:x="59cm" svg:y="19.75cm">
          <text:p text:style-name="P1"><text:span text:style-name="T1">To Do Lis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cm" svg:height="24.5cm" svg:x="81.25cm" svg:y="19.75cm">
          <text:p text:style-name="P3"><text:span text:style-name="T5">To Do Importan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9" draw:layer="layout" svg:width="93.314cm" svg:height="49.865cm" svg:x="3cm" svg:y="3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2">Feature Name</text:span></text:p>
              </table:table-cell>
              <table:table-cell>
                <text:p text:style-name="P5"><text:span text:style-name="T2">Comment</text:span></text:p>
              </table:table-cell>
              <table:table-cell>
                <text:p text:style-name="P5"><text:span text:style-name="T2">Progress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2">Settings Tab</text:span></text:p>
              </table:table-cell>
              <table:table-cell>
                <text:p text:style-name="P5"><text:span text:style-name="T6">1. Change Theme</text:span></text:p>
                <text:p text:style-name="P5"><text:span text:style-name="T6">2. Adjust elements by drag and drop</text:span></text:p>
                <text:p text:style-name="P5"><text:span text:style-name="T6">3. Change backgroud wallpaper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2">Dynamic Clock</text:span></text:p>
              </table:table-cell>
              <table:table-cell>
                <text:p text:style-name="P5"><text:span text:style-name="T6">1. Showing seconds aswell</text:span></text:p>
                <text:p text:style-name="P5"><text:span text:style-name="T6">2. Weather below it with suitable icon</text:span></text:p>
                <text:p text:style-name="P5"><text:span text:style-name="T6">3. 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2">Dynamic Weather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7">List</text:span></text:p>
              </table:table-cell>
              <table:table-cell>
                <text:p text:style-name="P5"><text:span text:style-name="T8">1. Clear list button</text:span></text:p>
                <text:p text:style-name="P5"><text:span text:style-name="T8">2. Remove items button aka completed</text:span></text:p>
                <text:p text:style-name="P5"><text:span text:style-name="T8">3. <text:s/>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100cm" fo:page-height="5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4T18:51:55.815213150</meta:creation-date>
    <dc:date>2026-05-15T22:48:29.873641049</dc:date>
    <meta:editing-duration>PT2H18M56S</meta:editing-duration>
    <meta:editing-cycles>5</meta:editing-cycles>
    <meta:generator>LibreOffice/26.2.3.2$Linux_X86_64 LibreOffice_project/ca14918b0fa569b9db704e10d20c5d2a5a16ac6d</meta:generator>
    <meta:document-statistic meta:object-count="9"/>
  </office:meta>
</office:document-meta>
</file>